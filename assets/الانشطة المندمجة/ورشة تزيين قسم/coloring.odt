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writing-mode="rl-tb"/>
    </style:style>
    <style:style style:name="T2" style:parent-style-name="Policepardéfaut" style:family="text">
      <style:text-properties style:font-name="Courier New" style:font-name-complex="Courier New"/>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T11" style:parent-style-name="Policepardéfaut" style:family="text">
      <style:text-properties style:font-name="Arial" style:font-name-complex="Arial"/>
    </style:style>
    <style:style style:name="T12" style:parent-style-name="Policepardéfaut" style:family="text">
      <style:text-properties style:font-name="Arial" style:font-name-complex="Arial"/>
    </style:style>
    <style:style style:name="T13" style:parent-style-name="Policepardéfaut" style:family="text">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Unicode MS" style:font-name-complex="Arial Unicode MS"/>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Courier New" style:font-name-complex="Courier New"/>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Courier New" style:font-name-complex="Courier New"/>
    </style:style>
    <style:style style:name="T26" style:parent-style-name="Policepardéfaut" style:family="text">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style>
    <style:style style:name="T29" style:parent-style-name="Policepardéfaut" style:family="text">
      <style:text-properties style:font-name="Arial Unicode MS" style:font-name-complex="Arial Unicode MS"/>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Courier New" style:font-name-complex="Courier New"/>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style:style>
    <style:style style:name="T45" style:parent-style-name="Policepardéfaut" style:family="text">
      <style:text-properties style:font-name="Arial Unicode MS" style:font-name-complex="Arial Unicode MS"/>
    </style:style>
    <style:style style:name="T46" style:parent-style-name="Policepardéfaut" style:family="text">
      <style:text-properties style:font-name="Arial Unicode MS" style:font-name-complex="Arial Unicode MS"/>
    </style:style>
    <style:style style:name="T47" style:parent-style-name="Policepardéfaut" style:family="text">
      <style:text-properties style:font-name="Arial Unicode MS" style:font-name-complex="Arial Unicode MS"/>
    </style:style>
    <style:style style:name="T48" style:parent-style-name="Policepardéfaut" style:family="text">
      <style:text-properties style:font-name="Arial" style:font-name-complex="Arial"/>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Unicode MS" style:font-name-complex="Arial Unicode MS"/>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Courier New" style:font-name-complex="Courier New"/>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office:automatic-styles>
  <office:body>
    <office:text text:use-soft-page-breaks="true">
      <text:p text:style-name="P1">ﺗﺄﺗﻲ ﻫﺬه اﻟﻮرﺷﺔ ﻓﻲ إﻃﺎر اﻷﻧﺸﻄﺔ اﻟﻤﻨﺪﻣﺠﺔ وﺗﻔﻌﻴﻞ اﻟﺤﻴﺎة اﻟﻤﺪرﺳﻴﺔ داﺧﻞ اﻟﻤﻠﺤﻘﺔ، واﻟﺘﻲ ﺗﻬﺪ فأﺳﺎﺳﺎ ً إ<text:span text:style-name="T2">ﱃ</text:span><text:s/><text:span text:style-name="T3">ﺗﺮﺳﻴﺦ</text:span><text:s/><text:span text:style-name="T4">ﻗﻴﻢ</text:span><text:s/><text:span text:style-name="T5">اﻟﺘﻌﺎون</text:span><text:s/><text:span text:style-name="T6">واﻟﻌﻤﻞ</text:span><text:s/><text:span text:style-name="T7">اﻟﺠﻤﺎﻋﻲ</text:span><text:s/><text:span text:style-name="T8">ﺑﻴﻦ</text:span><text:s/><text:span text:style-name="T9">اﻷﺳﺎﺗﺬة</text:span><text:s/><text:span text:style-name="T10">اﻟﻤﺘﺪرﺑﻴﻦ</text:span>.<text:s/><text:span text:style-name="T11">وﻗﺪ</text:span><text:s/><text:span text:style-name="T12">ﺗﻮﺧﺖ</text:span><text:s/><text:span text:style-name="T13">اﻟﻮرﺷﺔ</text:span><text:s/><text:span text:style-name="T14">ﺗﺤﻘ</text:span>ﻴ ﻖﺟﻤﻠﺔ ﻣﻦ اﻷﻫﺪاف اﻟﺘﺮﺑﻮﻳﺔ واﻟﺘﻨﻈﻴﻤﻴﺔ اﻟﻤﺘﻜﺎﻣﻠﺔ؛ ﺣﻴﺚ رﻛﺰت أوﻻً ﻋ<text:span text:style-name="T15">ﲆ</text:span><text:s/><text:span text:style-name="T16">ﺗﺄﻫﻴﻞ</text:span><text:s/><text:span text:style-name="T17">اﻟﻔﻀﺎء</text:span><text:s/><text:span text:style-name="T18">اﻟﺘﺮﺑﻮي</text:span><text:s/><text:span text:style-name="T19">ﻣﻦ</text:span><text:s/><text:span text:style-name="T20">ﺧﻼ</text:span>ل ﺗﺤﺴﻴﻦ ﺟﻤﺎﻟﻴﺔ ﺑﻴﺌﺔ اﻟﺘﻌﻠﻢ داﺧﻞ اﻟﺤﺠﺮة اﻟﺪراﺳﻴﺔ، وﺗﺤﻮﻳﻞ ﺟﺪران اﻟﻘﺴﻢ إ<text:span text:style-name="T21">ﱃ</text:span><text:s/><text:span text:style-name="T22">ﻟﻮﺣﺎت</text:span><text:s/><text:span text:style-name="T23">ﺗﻔﺎﻋﻠﻴﺔ</text:span><text:s/><text:span text:style-name="T24">ﻣﻠﻬﻤ</text:span>ﺔ وﻣﺤﻔﺰة ﺗﻔﺘﺢ آﻓﺎق اﻹﺑﺪاع. ﻛﻤﺎ ﺳﻌﻰ اﻟﻤﺸﺎرﻛﻮن ﻣﻦ ﺧﻼل ﻫﺬا اﻟﻌﻤﻞ إ<text:span text:style-name="T25">ﱃ</text:span><text:s/><text:span text:style-name="T26">ﺗﺮك</text:span><text:s/><text:span text:style-name="T27">أﺛﺮ</text:span><text:s/><text:span text:style-name="T28">إﻳﺠﺎ</text:span>ﺑﻲ ﻣﺴﺘﺪام ﻳﻜﺮس ﺛﻘﺎﻓﺔ اﻻﻧﺘﻤﺎء ﻟﻠﻤﺮﻛﺰ، وﻳﺨﻠﺪ ذﻛﺮى اﻟﻔﻮج اﻟﺘﺪرﻳﺒﻲ ﻟﻴﻜﻮن ﻗﺪوة وﻧﻤﻮذﺟﺎ ً ﻳﺤﺘﺬى ﺑﻪ ﻟﻸﻓﻮاج اﻟﻘﺎدﻣﺔ. ﻋﻼوة ﻋ<text:span text:style-name="T29">ﲆ</text:span><text:s/><text:span text:style-name="T30">ذﻟﻚ،</text:span><text:s/><text:span text:style-name="T31">ﺷﻜﻠﺖ</text:span><text:s/><text:span text:style-name="T32">اﻟﻮرﺷﺔ</text:span><text:s/><text:span text:style-name="T33">ﻓﺮﺻﺔ</text:span><text:s/><text:span text:style-name="T34">ﺣﻘﻴﻘﻴﺔ</text:span><text:s/><text:span text:style-name="T35">ﻟﺘﻨﻤﻴﺔ</text:span><text:s/><text:span text:style-name="T36">اﻟﻤﻬﺎرات</text:span><text:s/><text:span text:style-name="T37">اﻟﻨﺎﻋﻤﺔ</text:span><text:s/>)Soft Skills(<text:s/>ﻟﺪى اﻷﺳﺎﺗﺬة ﻋﺒﺮ ﺗﻌﺰﻳﺰ ﻗﻴﻢ اﻟﺘﺸﺎرك، اﻟﻤﺒﺎدرة، وﺗﺤﻤﻞ اﻟﻤﺴﺆوﻟﻴﺔ، واﻟﻌﻤﻞ ﺑﺮوح اﻟﻔﺮﻳﻖ اﻟﻮاﺣﺪ، وﻫﻲ ﻛﻠﻬﺎ ﻛﻔﺎﻳﺎت ﻗﻴﺎدﻳﺔ أﺳﺎﺳﻴﺔ ﻻ ﻏﻨﻰ ﻋﻨﻬﺎ ﻓﻲ اﻟﻤﺴﺎر اﻟﻤﻬﻨﻲ واﻟﺘﺮﺑﻮي ﻟﻸﺳﺘﺎذ.<text:s/>ﻟﻘﺪ ﺗﻢ ﺗﻘﺴﻴﻢ اﻟﻌﻤﻞ اﻹﺑﺪاﻋﻲ واﻟﺘﻨﻈﻴﻤﻲ داﺧﻞ اﻟﻘﺴﻢ إ<text:span text:style-name="T38">ﱃ</text:span><text:s/><text:span text:style-name="T39">ﻋﺪة</text:span><text:s/><text:span text:style-name="T40">أرﻛﺎن</text:span><text:s/><text:span text:style-name="T41">ﺟﻤﺎﻟﻴﺔ</text:span><text:s/><text:span text:style-name="T42">وﺗﺮﺑﻮﻳﺔ</text:span><text:s/><text:span text:style-name="T43">ﻣﺘﻜﺎﻣﻠﺔ</text:span><text:s/><text:span text:style-name="T44">ﺗﺘﺮﺟ</text:span>ﻢ ﻫﺬا اﻟﺘﻼﺣﻢ، وﻋﻜﺴﺖ ﺑﻮﺿﻮح روح اﻟﻤﺠﻤﻮﻋﺔ اﻟﻌﺎﻟﻴﺔ واﻻﻧﺴﺠﺎم اﻟﺘﺎم ﺑﻴﻦ اﻟﻤﺸﺎرﻛﻴﻦ؛ ﺣﻴﺚ ﺗﻤﻴﺰ اﻟﺮﻛ ﻦاﻷول ﺑـ ﺟﺪارﻳﺔ اﻟﺒﺼﻤﺎت واﻟﻮﻓﺎء اﻟﺤﺎﻣﻠﺔ ﻟﺸﻌﺎر )"ﻧﺮﺣﻞ وﻳﺒﻘﻰ اﻷﺛﺮ"(، وﻛﻤﺎ ﻳﻈﻬﺮ ﺑﻮﺿﻮح وﺑﺄﻟﻮان زاﻫﻴﺔ ﻓﻲ اﻟﻤﻠﻔﻴﻦ ﻓﻘﺪ ﺧﻂ اﻷﺳﺎﺗﺬة ﺑﺄﻳﺪﻳﻬﻢ ﻟﻮﺣﺔ ﻧﺎﺑﻀﺔ ﺑﺎﻟﺤﻴﺎة ﺗﺤﻤﻞ ﻋﺒﺎرة ﻣﻮﺟﻬﺔ وﻋﻤﻴﻘﺔ اﻟﺪﻻﻟﺔ ﻛﺘﺐ ﻋﻠﻴﻬﺎ: "ﻧﺮﺣﻞ وﻳﺒﻘﻰ اﻷﺛﺮ.. ﻓﻮج راﺋﻊ ﻣﺮ ّ ﻣﻦ ﻫﻨﺎ". وﻗﺪ ﺷﻬﺪ ﻫﺬا اﻟﺮﻛﻦ اﻟﺘﻮﺛﻴﻘﻲ ﺗﺨﻠﻴﺪ اﻟﺘﺘﺎﺑﻊ اﻟﺰﻣﻨﻲ اﻟﻌﺮﻳﻖ ﻟﻠﻔﻮج 2025-2026 ﻋﺒﺮ ﺑﺼﻤﺎت ﻣﻠﻮﻧﺔ وﻣﺒﺪﻋﺔ ﻃﺒﻌﺖ ﺑﺄﻳﺪي اﻷﺳﺎﺗﺬة اﻟﻤﺘﺪرﺑﻴﻦ أﻧﻔﺴﻬﻢ وأ ُ رﻓﻘﺖ ﺑﺘﻮﻗﻴﻌﺎﺗﻬﻢ اﻟﺸﺨﺼﻴﺔ اﻟﻤﻜﺘﻮﺑﺔ ﺑﺨﻂ اﻟﻴﺪ، ﻟﺘﻈﻞ ﻫﺬه اﻟﺠﺪارﻳﺔ ﺷﺎﻫﺪا ً ﺗﺎرﻳﺨﻴﺎ ً ووﺟﺪاﻧﻴﺎ ً ﺣﻴﺎ ً ﻋ<text:span text:style-name="T45">ﲆ</text:span><text:s/>ﻣﺮﺣﻠﺔ اﻟﺘﻜﻮﻳﻦ اﻷﺳﺎﺳﻴﺔ ﺑﻤﻠﺤﻘﺔ اﻟﻤﺸﻮر.<text:s/>وﻓﻲ ﺳﻴﺎق ﻣﺘﺼﻞ ﻳﺰاوج ﺑﻴﻦ اﻟﺠﻤﺎﻟﻴﺔ واﻟﺘﻮﺟﻴﻪ اﻟﺘﺮﺑﻮي، ﺗﻢ ﺗﺨﺼﻴﺺ رﻛﻦ ﺧﺎص ﺑﺎﻟﻌﺒﺎرات اﻟﺘﺤﻔﻴﺰﻳﺔ اﻟﺤﺎﻣﻞ ﻟﺸﻌﺎر )"ﺑﺎﻟﺘﻌﺎون ﻧﺘﻌﻠﻢ وﺑﻌﺰﻳﻤﺔ ﻧﻨﺠﺢ"(، وﻫﻮ ﻋﺒﺎرة ﻋﻦ رﻛﻦ ﺗﻔﺎﻋﻠﻲ ﻣﻨﻈﻢ وﻣﻨﺴﻖ ﺑﻌﻨﺎﻳﺔ ﻋ<text:span text:style-name="T46">ﲆ</text:span><text:s/>اﻟﺠﺪار ﺣﻴﺚ ﻳﻀﻢ ﻣﺠﻤﻮﻋﺔ ﻣﻦ اﻟﺒﻄﺎﻗﺎت اﻟﻤﻠﻮﻧﺔ واﻟﻘﺼﺎﺻﺎت اﻟﻤﻘﺼﻮﺻﺔ ﺑﺪﻗﺔ واﻟﺘﻲ ﺗﺤﻤﻞ رﺳﺎﺋﻞ ﺗﺮﺑﻮﻳﺔ ﺑﻠﻴﻐﺔ، وﺗﻮﺟﻴﻬﺎت ﺗﺤﻔﻴﺰﻳﺔ، وﺣﻜﻤﺎ ً ﻋﻤﻴﻘﺔ ﺻﻴﻐﺖ ﺑﺜﻼث ﻟﻐﺎت أﺳﺎﺳﻴﺔ ﻫﻲ اﻟﻌﺮﺑﻴﺔ، اﻹﻧﺠﻠﻴﺰﻳﺔ، واﻟﻔﺮﻧﺴﻴﺔ، ﺗﺮﻛﺰ ﻓﻲ ﺟﻮﻫﺮﻫﺎ وﻣﻀﻤﻮﻧﻬﺎ اﻟﻤﻌﺮﻓﻲ ﻋ<text:span text:style-name="T47">ﲆ</text:span><text:s/><text:span text:style-name="T48">ﺑﺚ</text:span><text:s/><text:span text:style-name="T49">ﻗﻴﻢ</text:span><text:s/><text:span text:style-name="T50">اﻟﻨﺠﺎح،</text:span><text:s/><text:span text:style-name="T51">اﻹﺻﺮار،</text:span><text:s/><text:span text:style-name="T52">وﺗﺤﺪي</text:span><text:s/><text:span text:style-name="T53">اﻟﺼﻌﺎب</text:span>، وﻣﻔﻬﻮم اﻟﺘﻌﻠﻢ اﻟﺬاﺗﻲ اﻟﻤﺴﺘﻤﺮ.<text:s/>ً أﻣﺎ اﻟﺮﻛﻦ اﻟﺜﺎﻟﺚ واﻷﺧﻴﺮ ﻓﻘﺪ ﺗﺠﺴﺪ ﻓﻲ ﻟﻮﺣﺔ اﻟﺬاﻛﺮة واﻷﻧﺸﻄﺔ اﻟﻤﻮازﻳﺔ اﻟﺘﻲ أﺿﻔﺖ ﻃﺎﺑﻌﺎ ً إﻧﺴﺎﻧﻴﺎ ﺣﻤﻴﻤﻴﺎ ً ﻋ<text:span text:style-name="T54">ﲆ</text:span><text:s/><text:span text:style-name="T55">ﻓﻀﺎء</text:span><text:s/><text:span text:style-name="T56">اﻟﺤﺠﺮة؛</text:span><text:s/><text:span text:style-name="T57">إذ</text:span><text:s/><text:span text:style-name="T58">ﺗﻀﻤﻨﺖ</text:span><text:s/><text:span text:style-name="T59">ﺟﺪران</text:span><text:s/><text:span text:style-name="T60">اﻟﻘﺴﻢ</text:span><text:s/><text:span text:style-name="T61">إﻃﺎرا</text:span><text:s/><text:span text:style-name="T62">ً</text:span><text:s/><text:span text:style-name="T63">ﺧﺸﺒﻴﺎ</text:span><text:s/><text:span text:style-name="T64">ً</text:span><text:s/><text:span text:style-name="T65">ﻣﺨﺼﺼﺎ</text:span><text:s/><text:span text:style-name="T66">ً</text:span><text:s/><text:span text:style-name="T67">وﻣﺆﺛﺜﺎ</text:span><text:s/><text:span text:style-name="T68">ً</text:span><text:s/><text:span text:style-name="T69">ﺑﻌﻨﺎﻳﺔ</text:span><text:s/><text:span text:style-name="T70">ﻓﺎﺋﻘﺔ</text:span><text:s/><text:span text:style-name="T71">ﻟﺘﻮﺛ</text:span>ﻴ ﻖاﻟﻠﺤﻈﺎت اﻹﻧﺴﺎﻧﻴﺔ اﻟﺪاﻓﺌﺔ واﻟﻤﺤﻄﺎت اﻟﻤﻤﻴﺰة اﻟﺘﻲ ﻋﺎﺷﻬﺎ اﻟﻔﻮج ﺧﻼل ﻓﺘﺮة ﺗﻜﻮﻳﻨﻪ. وﺷﻤﻠﺖ ﻫﺬه اﻟﻠﻮﺣﺔ اﻟﺘﺬﻛﺎرﻳﺔ ﺑﺎﻗﺔ ﻣﻦ اﻟﺼﻮر اﻟﺠﻤﺎﻋﻴﺔ اﻟﺤﻴﺔ اﻟﺘﻲ ﺗﻮﺛﻖ رﺣﻼت ﺗﺮﻓﻴﻬﻴﺔ اﺳﺘﻜﺸﺎﻓﻴﺔ وﺧﺮﺟﺎت ﻣﻴﺪاﻧﻴﺔ<text:s/>Fresh"<text:s/>و<text:s/>"!Feeling so good"<text:s/>ﻣﻮازﻳﺔ ﻗﺎم ﺑﻬﺎ اﻟﻔﻮج 2، ﻣﻜﻤﻠﺔ ﺑﻌﺒﺎرات وﺗﻌﺒﻴﺮات ﺗﻔﺎؤﻟﻴﺔ ﻣﻠﻬﻤﺔ ﻣﺜﻞfrom the garden!"، ﻣﻤﺎ ﻳﺘﺮﺟﻢ ﺑﺸﻜﻞ ﻣﻠﻤﻮس ﻋﻤﻖ اﻷﺟﻮاء اﻟﻌﺎﺋﻠﻴﺔ، وﻧﻀﺞ اﻟﻌﻼﻗﺎت اﻹﻧﺴﺎﻧﻴﺔ، واﻟﺮواﺑﻂ اﻷﺧﻮﻳﺔ اﻟﻤﺘﻴﻨﺔ اﻟﺘﻲ ﺗﻢ ﺑﻨﺎؤﻫﺎ وﺻﻘﻠﻬﺎ ﺑﻴﻦ اﻷﺳﺎﺗﺬة ﻃﻴﻠﺔ ﻫﺬا اﻟﻤﻮﺳﻢ اﻟﺘﻜﻮﻳﻨﻲ اﻟﺤﺎﻓﻞ.<text:s/>إن اﻟﻘﻴﻤﺔ اﻟﺤﻘﻴﻘﻴﺔ ﻟﻬﺬا اﻟﻨﺸﺎط اﻟﻤﻨﺪﻣﺞ ﻻ ﺗﻨﺤﺼﺮ ﻓﻲ أﺑﻌﺎدﻫﺎ اﻟﺠﻤﺎﻟﻴﺔ واﻟﻬﻨﺪﺳﻴﺔ اﻟﺒﺴﻴﻄﺔ، أو ﻓﻲ ًﻛﻮﻧﻬﺎ ﻣﺠﺮد ﺗﺰﻳﻴﻦ ﻣﺎدي وﻋﺎﺑﺮ ﻷﺳﻮار اﻟﺤﺠﺮة اﻟﺪراﺳﻴﺔ، ﺑﻞ إﻧﻬﺎ ﺗﺘﻌﺪى ذﻟﻚ ﻟﺘﺸﻜﻞ ﻧﻤﻮذﺟﺎ ً ﺑﻴﺪاﻏﻮﺟﻴﺎ ﺗﻄﺒﻴﻘﻴﺎ ً وﻣﻜﺘﺴﺒﺎ ً ﻣﻬﻨﻴﺎ ً راﺳﺨﺎ ً ؛ ﺣﻴﺚ ﻳﻤﺜﻞ ﻫﺬا اﻟﻌﻤﻞ ﺗﺠﺴﻴﺪا ً ﺣﻴﺎ ً ﻟـ "اﻟﻮﺿﻌﻴﺔ اﻟﻤﺸﻜﻠﺔ" اﻟﺘﺪﺑﻴﺮﻳﺔ اﻟﺘﻲ اﻧﺨﺮط ﻓﻴﻬﺎ اﻷﺳﺎﺗﺬة ﺑﺸﻜﻞ ﺟﻤﺎﻋﻲ وﺗﺸﺎرﻛﻲ. وﻣﻦ اﻟﻤﺆﻣﻞ واﻟﻤﺴﺘﻬﺪف أن ﻳﻨﻘﻞ ﻫﺆﻻء اﻷﺳﺎﺗﺬة اﻟﻤﺘﺪرﺑﻮن ﻫﺬه اﻟﺘﺠﺮﺑﺔ اﻟﻤﻴﺪاﻧﻴﺔ اﻟﺮاﺋﺪة وﺧﻠﻔﻴﺎﺗﻬﺎ اﻟﻨﻈﺮﻳﺔ واﻟﻌﻤﻠﻴﺔ ﻣﺴﺘﻘﺒﻼ ً إ<text:span text:style-name="T72">ﱃ</text:span><text:s/><text:span text:style-name="T73">ﻣﺆﺳﺴﺎت</text:span><text:s/><text:span text:style-name="T74">ﺗﻌﻴﻴﻨﻬ</text:span>ﻢ اﻟﺮﺳﻤﻴﺔ وﻓﺼﻮﻟﻬﻢ اﻟﺪراﺳﻴﺔ اﻟﻤﻘﺒﻠﺔ. وﺳﻴﺴﻬﻢ ذﻟﻚ ﺑﺸﻜﻞ ﻓﻌﺎل وﻣﺒﺎﺷﺮ ﻓﻲ إرﺳﺎء أﺳﺲ ﻣﺪرﺳﺔ ﻋﻤﻮﻣﻴﺔ ﺟﺎذﺑﺔ، ﺣﻴﻮﻳﺔ، وﻣﺤﻔﺰة ﺗﻨﺒﺾ ﺑﺎﻟﺤﻴﺎة، وﺗﻠﻬﻢ اﻟﻤﺘﻌﻠﻤﻴﻦ واﻟﻤﺘﻌﻠﻤﺎت وﺗﺪﻓﻌﻬﻢ ﻧﺤﻮ اﻟﺘﻤﻴﺰ واﻹﺑﺪاع ﻓﻲ ﻣﺨﺘﻠﻒ رﺑﻮع اﻟﻤﻤﻠﻜﺔ اﻟﻤﻐﺮﺑﻴﺔ.<text:s/>اﻟﺬﻛﺎء اﻻﺻﻄﻨﺎﻋ</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mpte Microsoft</meta:initial-creator>
    <dc:creator>Compte Microsoft</dc:creator>
    <meta:creation-date>2026-06-29T04:14:00Z</meta:creation-date>
    <dc:date>2026-06-29T04:15:00Z</dc:date>
    <meta:template xlink:href="Normal" xlink:type="simple"/>
    <meta:editing-cycles>1</meta:editing-cycles>
    <meta:editing-duration>PT60S</meta:editing-duration>
    <meta:document-statistic meta:page-count="1" meta:paragraph-count="6" meta:word-count="502" meta:character-count="3258" meta:row-count="23" meta:non-whitespace-character-count="2762"/>
  </office:meta>
</office:document-meta>
</file>